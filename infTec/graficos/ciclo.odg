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206cm" fo:min-width="2.512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72cm" fo:min-width="3.7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72cm" fo:min-width="6.5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92cm" fo:min-width="6.5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52cm" fo:min-width="3.37cm" fo:padding-top="0.14cm" fo:padding-bottom="0.14cm" fo:padding-left="0.265cm" fo:padding-right="0.265cm" fo:wrap-option="wrap"/>
    </style:style>
    <style:style style:name="gr6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72cm" fo:min-width="4.994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72cm" fo:min-width="4.17cm" fo:padding-top="0.14cm" fo:padding-bottom="0.14cm" fo:padding-left="0.265cm" fo:padding-right="0.265cm" fo:wrap-option="wrap"/>
    </style:style>
    <style:style style:name="gr8" style:family="graphic" style:parent-style-name="objectwithoutfill">
      <style:graphic-properties svg:stroke-width="0.03cm" svg:stroke-color="#000000" draw:marker-start-width="0.3cm" draw:marker-end="Arrow" draw:marker-end-width="0.3cm" draw:fill="solid" draw:fill-color="#d3e2ff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svg:stroke-color="#000000" draw:marker-start-width="0.3cm" draw:marker-end-width="0.3cm" draw:fill="none" draw:fill-color="#d3e2ff" draw:textarea-horizontal-align="left" draw:auto-grow-height="true" draw:auto-grow-width="false" fo:min-height="0.712cm" fo:min-width="0.811cm"/>
    </style:style>
    <style:style style:name="gr10" style:family="graphic" style:parent-style-name="standard">
      <style:graphic-properties draw:stroke="none" svg:stroke-width="0.03cm" svg:stroke-color="#000000" draw:marker-start-width="0.3cm" draw:marker-end-width="0.3cm" draw:fill="none" draw:fill-color="#d3e2ff" draw:textarea-horizontal-align="left" draw:auto-grow-height="true" draw:auto-grow-width="false" fo:min-height="0.712cm" fo:min-width="0.603cm"/>
    </style:style>
    <style:style style:name="gr11" style:family="graphic" style:parent-style-name="standard">
      <style:graphic-properties draw:stroke="none" svg:stroke-width="0.03cm" svg:stroke-color="#000000" draw:marker-start-width="0.3cm" draw:marker-end-width="0.3cm" draw:fill="none" draw:fill-color="#d3e2ff" draw:textarea-horizontal-align="left" draw:auto-grow-height="true" draw:auto-grow-width="false" fo:min-height="1.423cm" fo:min-width="6.166cm"/>
    </style:style>
    <style:style style:name="gr12" style:family="graphic" style:parent-style-name="standard">
      <style:graphic-properties svg:stroke-width="0.03cm" svg:stroke-color="#000000" draw:marker-start-width="0.3cm" draw:marker-end-width="0.3cm" draw:fill="solid" draw:fill-color="#d3e2ff" draw:textarea-horizontal-align="justify" draw:textarea-vertical-align="middle" draw:auto-grow-height="false" fo:min-height="1.77cm" fo:min-width="3.67cm" fo:padding-top="0.14cm" fo:padding-bottom="0.14cm" fo:padding-left="0.265cm" fo:padding-right="0.265cm" fo:wrap-option="wrap"/>
    </style:style>
    <style:style style:name="gr13" style:family="graphic" style:parent-style-name="standard">
      <style:graphic-properties draw:stroke="none" svg:stroke-width="0.03cm" svg:stroke-color="#000000" draw:marker-start-width="0.3cm" draw:marker-end-width="0.3cm" draw:fill="none" draw:fill-color="#d3e2ff" draw:textarea-horizontal-align="left" draw:auto-grow-height="true" draw:auto-grow-width="false" fo:min-height="1.423cm" fo:min-width="0.81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3e2ff"/>
      <style:paragraph-properties fo:text-align="center"/>
    </style:style>
    <style:style style:name="P3" style:family="paragraph">
      <loext:graphic-properties draw:fill="solid" draw:fill-color="#d3e2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d3e2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cm" svg:height="2.1cm" svg:x="0.753cm" svg:y="0.001cm">
          <text:p text:style-name="P1">Inicio del cic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3cm" svg:height="2cm" svg:x="4.241cm" svg:y="2.651cm">
          <draw:glue-point draw:id="4" svg:x="-5cm" svg:y="-2.25cm"/>
          <draw:glue-point draw:id="5" svg:x="-5cm" svg:y="2.75cm"/>
          <text:p text:style-name="P1"><text:span text:style-name="T1">Handshak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.1cm" svg:height="2cm" svg:x="10.441cm" svg:y="2.651cm">
          <text:p text:style-name="P1">Solicitud de datos GPS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1cm" svg:height="2.2cm" svg:x="7.841cm" svg:y="5.851cm">
          <text:p text:style-name="P1">Adquisición de</text:p>
          <text:p text:style-name="P1">datos de temperatura </text:p>
          <text:p text:style-name="P1">y velocidad de viento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7.8cm" svg:height="3.6cm" svg:x="21.49cm" svg:y="19.55cm">
          <text:p text:style-name="P1">¿Existencia de usuario conectad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1" draw:id="id11" draw:layer="layout" svg:width="5.524cm" svg:height="2cm" svg:x="14.217cm" svg:y="20.35cm">
          <text:p text:style-name="P1">U.P. en modo </text:p>
          <text:p text:style-name="P1">bajo consu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" draw:id="id12" draw:layer="layout" svg:width="4.7cm" svg:height="2cm" svg:x="31.14cm" svg:y="20.35cm">
          <text:p text:style-name="P1">Interfaz de usuario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.903cm" svg:y1="2.101cm" svg:x2="4.241cm" svg:y2="3.201cm" draw:start-shape="id1" draw:start-glue-point="8" draw:end-shape="id2" draw:end-glue-point="4" svg:d="M2903 2101v1100h1338" svg:viewBox="0 0 1339 1101">
          <text:p/>
        </draw:connector>
        <draw:connector draw:style-name="gr8" draw:text-style-name="P2" draw:layer="layout" svg:x1="8.541cm" svg:y1="3.651cm" svg:x2="10.441cm" svg:y2="3.651cm" draw:start-shape="id2" draw:start-glue-point="1" draw:end-shape="id3" draw:end-glue-point="3" svg:d="M8541 3651h1900" svg:viewBox="0 0 1901 1">
          <text:p/>
        </draw:connector>
        <draw:connector draw:style-name="gr8" draw:text-style-name="P2" draw:layer="layout" svg:x1="17.741cm" svg:y1="6.951cm" svg:x2="14.941cm" svg:y2="6.951cm" draw:start-shape="id4" draw:start-glue-point="5" draw:end-shape="id5" draw:end-glue-point="1" svg:d="M17741 6951h-2800" svg:viewBox="0 0 2801 1">
          <text:p/>
        </draw:connector>
        <draw:connector draw:style-name="gr8" draw:text-style-name="P2" draw:layer="layout" svg:x1="11.391cm" svg:y1="8.051cm" svg:x2="11.391cm" svg:y2="9.051cm" draw:start-shape="id5" draw:start-glue-point="2" draw:end-shape="id6" draw:end-glue-point="0" svg:d="M11391 8051v1000" svg:viewBox="0 0 1 1001">
          <text:p/>
        </draw:connector>
        <draw:connector draw:style-name="gr8" draw:text-style-name="P2" draw:layer="layout" svg:x1="11.391cm" svg:y1="11.251cm" svg:x2="11.391cm" svg:y2="12.151cm" draw:start-shape="id6" draw:start-glue-point="2" draw:end-shape="id7" draw:end-glue-point="0" svg:d="M11391 11251v900" svg:viewBox="0 0 1 901">
          <text:p/>
        </draw:connector>
        <draw:connector draw:style-name="gr8" draw:text-style-name="P2" draw:layer="layout" svg:x1="14.941cm" svg:y1="16.451cm" svg:x2="21.84cm" svg:y2="16.451cm" draw:start-shape="id8" draw:start-glue-point="1" draw:end-shape="id9" draw:end-glue-point="3" svg:d="M14941 16451h6899" svg:viewBox="0 0 6900 1">
          <text:p/>
        </draw:connector>
        <draw:connector draw:style-name="gr8" draw:text-style-name="P2" draw:layer="layout" svg:x1="21.49cm" svg:y1="21.35cm" svg:x2="19.741cm" svg:y2="21.35cm" draw:start-shape="id10" draw:start-glue-point="5" draw:end-shape="id11" draw:end-glue-point="1" svg:d="M21490 21350h-1749" svg:viewBox="0 0 1750 1">
          <text:p/>
        </draw:connector>
        <draw:connector draw:style-name="gr8" draw:text-style-name="P2" draw:layer="layout" svg:x1="29.29cm" svg:y1="21.35cm" svg:x2="31.14cm" svg:y2="21.35cm" draw:start-shape="id10" draw:start-glue-point="7" draw:end-shape="id12" draw:end-glue-point="3" svg:d="M29290 21350h1850" svg:viewBox="0 0 1851 1">
          <text:p/>
        </draw:connector>
        <draw:connector draw:style-name="gr8" draw:text-style-name="P2" draw:layer="layout" svg:x1="2.903cm" svg:y1="5.951cm" svg:x2="4.241cm" svg:y2="4.201cm" draw:start-shape="id13" draw:start-glue-point="0" draw:end-shape="id2" draw:end-glue-point="5" svg:d="M2903 5951v-1750h1338" svg:viewBox="0 0 1339 1751">
          <text:p/>
        </draw:connector>
        <draw:frame draw:style-name="gr9" draw:text-style-name="P4" draw:layer="layout" svg:width="1.311cm" svg:height="0.962cm" svg:x="20.54cm" svg:y="20.188cm">
          <draw:text-box>
            <text:p>No</text:p>
          </draw:text-box>
        </draw:frame>
        <draw:frame draw:style-name="gr10" draw:text-style-name="P4" draw:layer="layout" svg:width="1.103cm" svg:height="0.962cm" svg:x="29.429cm" svg:y="20.188cm">
          <draw:text-box>
            <text:p>Sí</text:p>
          </draw:text-box>
        </draw:frame>
        <draw:frame draw:style-name="gr11" draw:text-style-name="P4" draw:layer="layout" svg:width="8.649cm" svg:height="1.673cm" svg:x="5.551cm" svg:y="20.388cm">
          <draw:text-box>
            <text:p>Espera hasta próximo ciclo</text:p>
          </draw:text-box>
        </draw:frame>
        <draw:custom-shape draw:style-name="gr12" draw:text-style-name="P2" xml:id="id4" draw:id="id4" draw:layer="layout" svg:width="8.4cm" svg:height="4.1cm" svg:x="17.741cm" svg:y="4.901cm">
          <text:p text:style-name="P1">¿Hora de adquirir datos acústico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7.541cm" svg:y1="3.651cm" svg:x2="21.941cm" svg:y2="4.901cm" draw:start-shape="id3" draw:start-glue-point="1" draw:end-shape="id4" draw:end-glue-point="4" svg:d="M17541 3651h4400v1250" svg:viewBox="0 0 4401 1251">
          <text:p/>
        </draw:connector>
        <draw:frame draw:style-name="gr9" draw:text-style-name="P4" draw:layer="layout" svg:width="1.311cm" svg:height="0.962cm" svg:x="25.93cm" svg:y="5.839cm">
          <draw:text-box>
            <text:p>No</text:p>
          </draw:text-box>
        </draw:frame>
        <draw:connector draw:style-name="gr8" draw:text-style-name="P2" draw:layer="layout" draw:line-skew="1.843cm" svg:x1="26.141cm" svg:y1="6.951cm" svg:x2="25.39cm" svg:y2="15.351cm" draw:start-shape="id4" draw:start-glue-point="7" draw:end-shape="id9" draw:end-glue-point="0" svg:d="M26141 6951h2359v5226h-3110v3174" svg:viewBox="0 0 3111 8401">
          <text:p/>
        </draw:connector>
        <draw:frame draw:style-name="gr9" draw:text-style-name="P4" draw:layer="layout" svg:width="1.311cm" svg:height="0.962cm" svg:x="16.83cm" svg:y="5.839cm">
          <draw:text-box>
            <text:p>Sí</text:p>
          </draw:text-box>
        </draw:frame>
        <draw:connector draw:style-name="gr8" draw:text-style-name="P2" draw:layer="layout" svg:x1="25.39cm" svg:y1="17.551cm" svg:x2="25.39cm" svg:y2="19.55cm" draw:start-shape="id9" draw:start-glue-point="2" draw:end-shape="id10" draw:end-glue-point="4" svg:d="M25390 17551v1999" svg:viewBox="0 0 1 2000">
          <text:p/>
        </draw:connector>
        <draw:frame draw:style-name="gr13" draw:text-style-name="P4" draw:layer="layout" svg:width="4.8cm" svg:height="1.673cm" svg:x="25.341cm" svg:y="12.401cm">
          <draw:text-box>
            <text:p>Actualización</text:p>
            <text:p>simplificada</text:p>
          </draw:text-box>
        </draw:frame>
        <draw:frame draw:style-name="gr13" draw:text-style-name="P4" draw:layer="layout" svg:width="4.8cm" svg:height="1.673cm" svg:x="16.741cm" svg:y="14.801cm">
          <draw:text-box>
            <text:p>Actualización</text:p>
            <text:p>completa</text:p>
          </draw:text-box>
        </draw:frame>
        <draw:custom-shape draw:style-name="gr1" draw:text-style-name="P2" xml:id="id14" draw:id="id14" draw:layer="layout" svg:width="4.3cm" svg:height="2.1cm" svg:x="31.34cm" svg:y="23.901cm">
          <text:p text:style-name="P1">Fin de cic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33.49cm" svg:y1="22.35cm" svg:x2="33.49cm" svg:y2="23.901cm" draw:start-shape="id12" draw:start-glue-point="2" draw:end-shape="id14" draw:end-glue-point="4" svg:d="M33490 22350v1551" svg:viewBox="0 0 1 1552">
          <text:p/>
        </draw:connector>
        <draw:custom-shape draw:style-name="gr6" draw:text-style-name="P2" xml:id="id13" draw:id="id13" draw:layer="layout" svg:width="5.524cm" svg:height="2cm" svg:x="0.141cm" svg:y="5.951cm">
          <text:p text:style-name="P1">U.P sale del modo</text:p>
          <text:p text:style-name="P1">bajo consum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14.217cm" svg:y1="21.35cm" svg:x2="2.903cm" svg:y2="7.951cm" draw:start-shape="id11" draw:start-glue-point="3" draw:end-shape="id13" draw:end-glue-point="2" svg:d="M14217 21350h-11314v-13399" svg:viewBox="0 0 11315 13400">
          <text:p/>
        </draw:connector>
        <draw:custom-shape draw:style-name="gr4" draw:text-style-name="P2" xml:id="id6" draw:id="id6" draw:layer="layout" svg:width="7.1cm" svg:height="2.2cm" svg:x="7.841cm" svg:y="9.051cm">
          <text:p text:style-name="P1">Adquisición de </text:p>
          <text:p text:style-name="P1">datos acústi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1cm" svg:height="2.2cm" svg:x="7.841cm" svg:y="12.151cm">
          <text:p text:style-name="P1">Solicitud de </text:p>
          <text:p text:style-name="P1">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7.1cm" svg:height="2.2cm" svg:x="7.841cm" svg:y="15.351cm">
          <text:p text:style-name="P1">Solicitud de </text:p>
          <text:p text:style-name="P1">datos proces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11.391cm" svg:y1="14.351cm" svg:x2="11.391cm" svg:y2="15.351cm" draw:start-shape="id7" draw:start-glue-point="2" draw:end-shape="id8" draw:end-glue-point="0" svg:d="M11391 14351v1000" svg:viewBox="0 0 1 1001">
          <text:p/>
        </draw:connector>
        <draw:custom-shape draw:style-name="gr4" draw:text-style-name="P2" xml:id="id9" draw:id="id9" draw:layer="layout" svg:width="7.1cm" svg:height="2.2cm" svg:x="21.84cm" svg:y="15.351cm">
          <text:p text:style-name="P5">Actualización del <text:span text:style-name="T1">log</text:span></text:p>
          <text:p text:style-name="P1">en la U.C.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5:25:15.877248092</meta:creation-date>
    <dc:date>2019-09-13T10:37:49.740729516</dc:date>
    <meta:editing-duration>PT15M28S</meta:editing-duration>
    <meta:editing-cycles>5</meta:editing-cycles>
    <meta:generator>LibreOffice/6.0.7.3$Linux_X86_64 LibreOffice_project/00m0$Build-3</meta:generator>
    <meta:document-statistic meta:object-count="36"/>
  </office:meta>
</office:document-meta>
</file>